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1.566cm" fo:min-width="0cm" fo:padding-top="1.1cm" fo:padding-bottom="0.2cm" fo:padding-left="0.2cm" fo:padding-right="0.2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8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6.086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init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1.0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621cm" svg:x="20cm" svg:y="24.15cm">
          <draw:text-box>
            <text:p text:style-name="P1"><text:span text:style-name="T1">m_err</text:span></text:p>
            <text:p text:style-name="P1"><text:span text:style-name="T1">init() +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1.499cm" svg:x2="23.75cm" svg:y2="24.423cm" draw:start-shape="id3" draw:start-glue-point="3" draw:end-shape="id1" draw:end-glue-point="17" svg:d="M27000 11499c-2437 0-813 12924-3250 12924" svg:viewBox="0 0 3251 129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9.5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9.988cm" svg:x2="32.25cm" svg:y2="11.277cm" draw:start-shape="id5" draw:start-glue-point="3" draw:end-shape="id3" draw:end-glue-point="4" svg:d="M35250 99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1.0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1.488cm" svg:x2="32.25cm" svg:y2="11.499cm" draw:start-shape="id6" draw:start-glue-point="3" draw:end-shape="id3" draw:end-glue-point="1" svg:d="M35250 11488c-2250 0-750 11-3000 11" svg:viewBox="0 0 3001 12">
          <text:p/>
        </draw:connector>
        <draw:frame draw:style-name="gr2" draw:text-style-name="P5" xml:id="id7" draw:id="id7" draw:layer="layout" svg:width="5.5cm" svg:height="1.156cm" svg:x="35.25cm" svg:y="12.5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3.122cm" svg:x2="32.25cm" svg:y2="11.721cm" draw:start-shape="id7" draw:start-glue-point="3" draw:end-shape="id3" draw:end-glue-point="5" svg:d="M35250 131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30.3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30.794cm" svg:x2="23.75cm" svg:y2="24.668cm" draw:start-shape="id8" draw:start-glue-point="3" draw:end-shape="id1" draw:end-glue-point="20" svg:d="M27000 30794c-2437 0-813-6126-3250-6126" svg:viewBox="0 0 3251 6127">
          <text:p/>
        </draw:connector>
        <draw:frame draw:style-name="gr2" draw:text-style-name="P5" xml:id="id9" draw:id="id9" draw:layer="layout" svg:width="5.25cm" svg:height="0.889cm" svg:x="27cm" svg:y="16.8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17.31cm" svg:x2="23.75cm" svg:y2="24.546cm" draw:start-shape="id9" draw:start-glue-point="3" draw:end-shape="id1" draw:end-glue-point="18" svg:d="M27000 17310c-2437 0-813 7236-3250 7236" svg:viewBox="0 0 3251 7237">
          <text:p/>
        </draw:connector>
        <draw:frame draw:style-name="gr1" draw:text-style-name="P2" draw:layer="layout" svg:width="5.5cm" svg:height="3.116cm" svg:x="35.25cm" svg:y="28.7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8.7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9.144cm" svg:x2="32.25cm" svg:y2="30.572cm" draw:start-shape="id10" draw:start-glue-point="3" draw:end-shape="id8" draw:end-glue-point="4" svg:d="M35250 291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32.6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33.088cm" svg:x2="32.25cm" svg:y2="31.016cm" draw:start-shape="id11" draw:start-glue-point="3" draw:end-shape="id8" draw:end-glue-point="5" svg:d="M35250 33088c-2250 0-750-2072-3000-2072" svg:viewBox="0 0 3001 2073">
          <text:p/>
        </draw:connector>
        <draw:frame draw:style-name="gr2" draw:text-style-name="P5" xml:id="id12" draw:id="id12" draw:layer="layout" svg:width="5.5cm" svg:height="0.889cm" svg:x="35.25cm" svg:y="18.1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8.571cm" svg:x2="32.25cm" svg:y2="17.162cm" draw:start-shape="id12" draw:start-glue-point="3" draw:end-shape="id9" draw:end-glue-point="6" svg:d="M35250 18571c-2250 0-750-1409-3000-1409" svg:viewBox="0 0 3001 1410">
          <text:p/>
        </draw:connector>
        <draw:frame draw:style-name="gr6" draw:text-style-name="P5" xml:id="id13" draw:id="id13" draw:layer="layout" svg:width="5.25cm" svg:height="0.889cm" svg:x="27cm" svg:y="37.8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8.096cm" svg:x2="23.75cm" svg:y2="24.75cm" draw:start-shape="id13" draw:start-glue-point="4" draw:end-shape="id1" draw:end-glue-point="12" svg:d="M27000 38096c-2437 0-813-13346-3250-13346" svg:viewBox="0 0 3251 13347">
          <text:p/>
        </draw:connector>
        <draw:frame draw:style-name="gr2" draw:text-style-name="P5" xml:id="id14" draw:id="id14" draw:layer="layout" svg:width="5.25cm" svg:height="0.889cm" svg:x="27cm" svg:y="39.3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9.744cm" svg:x2="23.75cm" svg:y2="24.833cm" draw:start-shape="id14" draw:start-glue-point="3" draw:end-shape="id1" draw:end-glue-point="21" svg:d="M27000 39744c-2437 0-813-14911-3250-14911" svg:viewBox="0 0 3251 14912">
          <text:p/>
        </draw:connector>
        <draw:connector draw:style-name="gr3" draw:text-style-name="P3" draw:layer="layout" draw:type="curve" svg:x1="35.25cm" svg:y1="14.794cm" svg:x2="32.25cm" svg:y2="17.014cm" draw:start-shape="id15" draw:start-glue-point="3" draw:end-shape="id9" draw:end-glue-point="4" svg:d="M35250 14794c-2250 0-750 2220-3000 2220" svg:viewBox="0 0 3001 2221">
          <text:p/>
        </draw:connector>
        <draw:frame draw:style-name="gr2" draw:text-style-name="P5" xml:id="id16" draw:id="id16" draw:layer="layout" svg:width="5.25cm" svg:height="0.889cm" svg:x="27cm" svg:y="12.9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3.345cm" svg:x2="23.75cm" svg:y2="24.464cm" draw:start-shape="id16" draw:start-glue-point="3" draw:end-shape="id1" draw:end-glue-point="8" svg:d="M27000 13345c-2437 0-813 11119-3250 11119" svg:viewBox="0 0 3251 11120">
          <text:p/>
        </draw:connector>
        <draw:frame draw:style-name="gr2" draw:text-style-name="P5" xml:id="id17" draw:id="id17" draw:layer="layout" svg:width="5.5cm" svg:height="0.889cm" svg:x="35.25cm" svg:y="21.2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71cm" svg:x2="32.25cm" svg:y2="17.606cm" draw:start-shape="id17" draw:start-glue-point="3" draw:end-shape="id9" draw:end-glue-point="5" svg:d="M35250 21710c-2250 0-750-4104-3000-4104" svg:viewBox="0 0 3001 4105">
          <text:p/>
        </draw:connector>
        <draw:frame draw:style-name="gr7" draw:text-style-name="P5" xml:id="id18" draw:id="id18" draw:layer="layout" svg:width="5.25cm" svg:height="1.156cm" svg:x="27cm" svg:y="9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9.672cm" svg:x2="23.75cm" svg:y2="24.259cm" draw:start-shape="id18" draw:start-glue-point="3" draw:end-shape="id1" draw:end-glue-point="6" svg:d="M27000 9672c-2437 0-813 14587-3250 14587" svg:viewBox="0 0 3251 14588">
          <text:p/>
        </draw:connector>
        <draw:frame draw:style-name="gr6" draw:text-style-name="P5" xml:id="id19" draw:id="id19" draw:layer="layout" svg:width="4.25cm" svg:height="0.889cm" svg:x="42.75cm" svg:y="18.8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19.131cm" svg:x2="40.75cm" svg:y2="18.793cm" draw:start-shape="id19" draw:start-glue-point="6" draw:end-shape="id12" draw:end-glue-point="5" svg:d="M42750 19131c-1500 0-500-338-2000-338" svg:viewBox="0 0 2001 339">
          <text:p/>
        </draw:connector>
        <draw:frame draw:style-name="gr2" draw:text-style-name="P5" xml:id="id20" draw:id="id20" draw:layer="layout" svg:width="5.5cm" svg:height="0.889cm" svg:x="35.25cm" svg:y="19.7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0.155cm" svg:x2="32.25cm" svg:y2="17.31cm" draw:start-shape="id20" draw:start-glue-point="3" draw:end-shape="id9" svg:d="M35250 20155c-2250 0-750-2845-3000-2845" svg:viewBox="0 0 3001 2846">
          <text:p/>
        </draw:connector>
        <draw:connector draw:style-name="gr3" draw:text-style-name="P3" draw:layer="layout" draw:type="curve" svg:x1="42.75cm" svg:y1="19.511cm" svg:x2="40.75cm" svg:y2="19.933cm" draw:start-shape="id19" draw:start-glue-point="7" draw:end-shape="id20" draw:end-glue-point="4" svg:d="M42750 19511c-1500 0-500 422-2000 422" svg:viewBox="0 0 2001 423">
          <text:p/>
        </draw:connector>
        <draw:frame draw:style-name="gr5" draw:text-style-name="P4" xml:id="id21" draw:id="id21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1" draw:end-glue-point="1" svg:d="M13000 24594c-5625 0-1875-3-7500-3" svg:viewBox="0 0 7501 4">
          <text:p/>
        </draw:connector>
        <draw:frame draw:style-name="gr2" draw:text-style-name="P5" xml:id="id22" draw:id="id22" draw:layer="layout" svg:width="5.25cm" svg:height="0.889cm" svg:x="27cm" svg:y="20.7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1.144cm" svg:x2="23.75cm" svg:y2="24.587cm" draw:start-shape="id22" draw:start-glue-point="3" draw:end-shape="id1" draw:end-glue-point="19" svg:d="M27000 21144c-2437 0-813 3443-3250 3443" svg:viewBox="0 0 3251 3444">
          <text:p/>
        </draw:connector>
        <draw:frame draw:style-name="gr1" draw:text-style-name="P2" draw:layer="layout" svg:width="5.25cm" svg:height="4.106cm" svg:x="27cm" svg:y="40.8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frame draw:style-name="gr2" draw:text-style-name="P5" xml:id="id23" draw:id="id23" draw:layer="layout" svg:width="5.25cm" svg:height="0.889cm" svg:x="27cm" svg:y="40.8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41.244cm" svg:x2="23.75cm" svg:y2="24.915cm" draw:start-shape="id23" draw:start-glue-point="3" draw:end-shape="id1" draw:end-glue-point="14" svg:d="M27000 41244c-2437 0-813-16329-3250-16329" svg:viewBox="0 0 3251 16330">
          <text:p/>
        </draw:connector>
        <draw:frame draw:style-name="gr1" draw:text-style-name="P2" draw:layer="layout" svg:width="5.25cm" svg:height="3.116cm" svg:x="27cm" svg:y="33.9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6.245cm" svg:x2="23.75cm" svg:y2="24.956cm" draw:start-shape="id24" draw:start-glue-point="3" draw:end-shape="id1" draw:end-glue-point="15" svg:d="M27000 46245c-2437 0-813-21289-3250-21289" svg:viewBox="0 0 3251 21290">
          <text:p/>
        </draw:connector>
        <draw:frame draw:style-name="gr2" draw:text-style-name="P5" xml:id="id24" draw:id="id24" draw:layer="layout" svg:width="5.25cm" svg:height="0.889cm" svg:x="27cm" svg:y="45.801cm">
          <draw:text-box>
            <text:p text:style-name="P3"><text:span text:style-name="T2">text::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3cm" svg:y1="44.105cm" svg:x2="32.25cm" svg:y2="46.023cm" draw:start-shape="id25" draw:start-glue-point="3" draw:end-shape="id24" draw:end-glue-point="4" svg:d="M35300 44105c-2287 0-763 1918-3050 1918" svg:viewBox="0 0 3051 1919">
          <text:p/>
        </draw:connector>
        <draw:frame draw:style-name="gr1" draw:text-style-name="P2" draw:layer="layout" svg:width="5.25cm" svg:height="3.116cm" svg:x="35.3cm" svg:y="47.55cm">
          <draw:text-box>
            <text:p text:style-name="P1"><text:span text:style-name="T1">m_sDescription</text:span></text:p>
            <text:p text:style-name="P1"><text:span text:style-name="T1">m_iInvalidCodePoint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frame draw:style-name="gr9" draw:text-style-name="P5" xml:id="id26" draw:id="id26" draw:layer="layout" svg:width="5.25cm" svg:height="0.889cm" svg:x="35.3cm" svg:y="47.55cm">
          <draw:text-box>
            <text:p text:style-name="P3"><text:span text:style-name="T2">text::encode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3cm" svg:y1="47.994cm" svg:x2="32.25cm" svg:y2="46.467cm" draw:start-shape="id26" draw:start-glue-point="3" draw:end-shape="id24" draw:end-glue-point="5" svg:d="M35300 47994c-2287 0-763-1527-3050-1527" svg:viewBox="0 0 3051 1528">
          <text:p/>
        </draw:connector>
        <draw:frame draw:style-name="gr2" draw:text-style-name="P4" xml:id="id27" draw:id="id27" draw:layer="layout" svg:width="4cm" svg:height="0.622cm" svg:x="7.8cm" svg:y="38.1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8.392cm" svg:x2="11.8cm" svg:y2="38.411cm" draw:start-shape="id13" draw:start-glue-point="5" draw:end-shape="id27" draw:end-glue-point="1" svg:d="M27000 38392c-11400 0-3800 19-15200 19" svg:viewBox="0 0 15201 20">
          <text:p/>
        </draw:connector>
        <draw:connector draw:style-name="gr3" draw:text-style-name="P3" draw:layer="layout" draw:type="curve" svg:x1="7.8cm" svg:y1="38.411cm" svg:x2="5.5cm" svg:y2="24.688cm" draw:start-shape="id27" draw:start-glue-point="3" draw:end-shape="id21" draw:end-glue-point="6" svg:d="M7800 38411c-1725 0-575-13723-2300-13723" svg:viewBox="0 0 2301 137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8" draw:start-glue-point="3" draw:end-shape="id2" draw:end-glue-point="5" svg:d="M20000 21444c-1875 0-625 2928-2500 2928" svg:viewBox="0 0 2501 2929">
          <text:p/>
        </draw:connector>
        <draw:frame draw:style-name="gr2" draw:text-style-name="P5" xml:id="id28" draw:id="id28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0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X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X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4.344cm" svg:x2="23.75cm" svg:y2="24.709cm" draw:start-shape="id29" draw:start-glue-point="3" draw:end-shape="id1" draw:end-glue-point="11" svg:d="M27000 34344c-2437 0-813-9635-3250-9635" svg:viewBox="0 0 3251 9636">
          <text:p/>
        </draw:connector>
        <draw:frame draw:style-name="gr6" draw:text-style-name="P5" xml:id="id30" draw:id="id30" draw:layer="layout" svg:width="5.45cm" svg:height="0.889cm" svg:x="35.3cm" svg:y="35.7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6.146cm" svg:x2="32.25cm" svg:y2="34.566cm" draw:start-shape="id30" draw:start-glue-point="3" draw:end-shape="id29" draw:end-glue-point="5" svg:d="M35300 36146c-2287 0-763-1580-3050-1580" svg:viewBox="0 0 3051 1581">
          <text:p/>
        </draw:connector>
        <draw:frame draw:style-name="gr2" draw:text-style-name="P5" xml:id="id29" draw:id="id29" draw:layer="layout" svg:width="5.25cm" svg:height="0.889cm" svg:x="27cm" svg:y="33.9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1" draw:id="id31" draw:layer="layout" svg:width="5.45cm" svg:height="0.889cm" svg:x="35.3cm" svg:y="34.2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4.647cm" svg:x2="32.25cm" svg:y2="34.122cm" draw:start-shape="id31" draw:end-shape="id29" draw:end-glue-point="4" svg:d="M35300 34647c-2287 0-763-525-3050-525" svg:viewBox="0 0 3051 526">
          <text:p/>
        </draw:connector>
        <draw:frame draw:style-name="gr2" draw:text-style-name="P5" xml:id="id32" draw:id="id32" draw:layer="layout" svg:width="5.25cm" svg:height="1.156cm" svg:x="27cm" svg:y="14.7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5.372cm" svg:x2="23.75cm" svg:y2="24.505cm" draw:start-shape="id32" draw:start-glue-point="3" draw:end-shape="id1" draw:end-glue-point="9" svg:d="M27000 15372c-2437 0-813 9133-3250 9133" svg:viewBox="0 0 3251 9134">
          <text:p/>
        </draw:connector>
        <draw:frame draw:style-name="gr11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1" draw:text-style-name="P9" draw:layer="layout" svg:width="1.602cm" svg:height="0.331cm" svg:x="22.896cm" svg:y="37.85cm">
          <draw:text-box>
            <text:p text:style-name="P8"><text:span text:style-name="T10">related_std</text:span></text:p>
          </draw:text-box>
        </draw:frame>
        <draw:frame draw:style-name="gr2" draw:text-style-name="P5" xml:id="id33" draw:id="id33" draw:layer="layout" svg:width="5.25cm" svg:height="0.889cm" svg:x="27cm" svg:y="22.901cm">
          <draw:text-box>
            <text:p text:style-name="P3"><text:span text:style-name="T2">iterator_error</text:span></text:p>
            <text:p text:style-name="P3"><text:span text:style-name="T3">Invalid iterator operation</text:span></text:p>
          </draw:text-box>
        </draw:frame>
        <draw:connector draw:style-name="gr3" draw:text-style-name="P3" draw:layer="layout" draw:type="curve" svg:x1="27cm" svg:y1="23.345cm" svg:x2="23.75cm" svg:y2="24.627cm" draw:start-shape="id33" draw:start-glue-point="3" draw:end-shape="id1" draw:end-glue-point="10" svg:d="M27000 23345c-2437 0-813 1282-3250 1282" svg:viewBox="0 0 3251 1283">
          <text:p/>
        </draw:connector>
        <draw:frame draw:style-name="gr1" draw:text-style-name="P2" draw:layer="layout" svg:width="5.5cm" svg:height="5.096cm" svg:x="35.25cm" svg:y="22.853cm">
          <draw:text-box>
            <text:p text:style-name="P1"><text:span text:style-name="T1">m_pContBegin</text:span></text:p>
            <text:p text:style-name="P1"><text:span text:style-name="T1">m_pContEnd</text:span></text:p>
            <text:p text:style-name="P1"><text:span text:style-name="T1">m_pInvalid</text:span></text:p>
            <text:p text:style-name="P1"><text:span text:style-name="T1">container_begin_pointer()</text:span></text:p>
            <text:p text:style-name="P1"><text:span text:style-name="T1">container_end_pointer()</text:span></text:p>
            <text:p text:style-name="P1"><text:span text:style-name="T1">init() +</text:span></text:p>
            <text:p text:style-name="P1"><text:span text:style-name="T1">iterator_pointer()</text:span></text:p>
            <text:p text:style-name="P1"><text:span text:style-name="T1">_print_extended_info() +</text:span></text:p>
          </draw:text-box>
        </draw:frame>
        <draw:frame draw:style-name="gr2" draw:text-style-name="P5" xml:id="id34" draw:id="id34" draw:layer="layout" svg:width="5.5cm" svg:height="0.889cm" svg:x="35.25cm" svg:y="22.853cm">
          <draw:text-box>
            <text:p text:style-name="P3"><text:span text:style-name="T2">pointer_iterator_error</text:span></text:p>
            <text:p text:style-name="P3"><text:span text:style-name="T3">Invalid operation on a pointer-like iterator</text:span></text:p>
          </draw:text-box>
        </draw:frame>
        <draw:connector draw:style-name="gr3" draw:text-style-name="P3" draw:layer="layout" draw:type="curve" svg:x1="35.25cm" svg:y1="23.297cm" svg:x2="32.25cm" svg:y2="23.345cm" draw:start-shape="id34" draw:start-glue-point="3" draw:end-shape="id33" draw:end-glue-point="1" svg:d="M35250 23297c-2250 0-750 48-3000 48" svg:viewBox="0 0 3001 49">
          <text:p/>
        </draw:connector>
        <draw:frame draw:style-name="gr1" draw:text-style-name="P2" draw:layer="layout" svg:width="5.25cm" svg:height="3.116cm" svg:x="35.3cm" svg:y="43.656cm">
          <draw:text-box>
            <text:p text:style-name="P1"><text:span text:style-name="T1">m_sDescription</text:span></text:p>
            <text:p text:style-name="P1"><text:span text:style-name="T1">m_viInvalid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frame draw:style-name="gr12" draw:text-style-name="P5" xml:id="id25" draw:id="id25" draw:layer="layout" svg:width="5.25cm" svg:height="0.889cm" svg:x="35.3cm" svg:y="43.661cm">
          <draw:text-box>
            <text:p text:style-name="P3"><text:span text:style-name="T2">text::decode_error</text:span></text:p>
            <text:p text:style-name="P3"><text:span text:style-name="T3">Text decoding error</text:span></text:p>
          </draw:text-box>
        </draw:frame>
        <draw:frame draw:style-name="gr13" draw:text-style-name="P2" draw:layer="layout" svg:width="5.5cm" svg:height="3.116cm" svg:x="35.25cm" svg:y="14.35cm">
          <draw:text-box>
            <text:p text:style-name="P1"><text:span text:style-name="T1">m_fpNotFound</text:span></text:p>
            <text:p text:style-name="P1"><text:span text:style-name="T1">file_path()</text:span></text:p>
            <text:p text:style-name="P1"><text:span text:style-name="T1">init() +</text:span></text:p>
            <text:p text:style-name="P1"><text:span text:style-name="T1">_print_extended_info() +</text:span></text:p>
          </draw:text-box>
        </draw:frame>
        <draw:frame draw:style-name="gr14" draw:text-style-name="P5" xml:id="id15" draw:id="id15" draw:layer="layout" svg:width="5.5cm" svg:height="0.889cm" svg:x="35.25cm" svg:y="14.35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</draw:page>
      <draw:page draw:name="Base data types" draw:style-name="dp1" draw:master-page-name="Predefinito">
        <draw:frame draw:style-name="gr2" draw:text-style-name="P5" xml:id="id36" draw:id="id36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5" draw:id="id35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5" draw:start-glue-point="3" draw:end-shape="id36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7" draw:start-glue-point="3" draw:end-shape="id36" draw:end-glue-point="5" svg:d="M19000 14578c-1500 0-500-1003-2000-1003" svg:viewBox="0 0 2001 1004">
          <text:p/>
        </draw:connector>
        <draw:connector draw:style-name="gr3" draw:text-style-name="P3" draw:layer="layout" draw:type="curve" svg:x1="34cm" svg:y1="17.044cm" svg:x2="24.5cm" svg:y2="14.825cm" draw:start-shape="id38" draw:start-glue-point="3" draw:end-shape="id37" draw:end-glue-point="5" svg:d="M34000 17044c-7125 0-2375-2219-9500-2219" svg:viewBox="0 0 9501 2220">
          <text:p/>
        </draw:connector>
        <draw:frame draw:style-name="gr14" draw:text-style-name="P5" xml:id="id38" draw:id="id38" draw:layer="layout" svg:width="3cm" svg:height="0.889cm" svg:x="34cm" svg:y="16.6cm">
          <draw:text-box>
            <text:p text:style-name="P3"><text:span text:style-name="T11">base_str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8.628cm" svg:x2="37cm" svg:y2="17.234cm" draw:start-shape="id39" draw:start-glue-point="3" draw:end-shape="id38" draw:end-glue-point="5" svg:d="M39200 18628c-1650 0-550-1394-2200-1394" svg:viewBox="0 0 2201 1395">
          <text:p/>
        </draw:connector>
        <draw:frame draw:style-name="gr14" draw:text-style-name="P5" xml:id="id39" draw:id="id39" draw:layer="layout" svg:width="4.25cm" svg:height="1.156cm" svg:x="39.2cm" svg:y="18.05cm">
          <draw:text-box>
            <text:p text:style-name="P3"><text:span text:style-name="T11">mstr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7" draw:id="id37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40" draw:start-glue-point="3" draw:end-shape="id37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1" draw:start-glue-point="3" draw:end-shape="id35" draw:end-glue-point="1" svg:d="M26500 11828c-1500 0-500 16-2000 16" svg:viewBox="0 0 2001 17">
          <text:p/>
        </draw:connector>
        <draw:frame draw:style-name="gr2" draw:text-style-name="P5" xml:id="id41" draw:id="id41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2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2" draw:start-glue-point="3" draw:end-shape="id41" draw:end-glue-point="1" svg:d="M34000 12538c-1687 0-563-710-2250-710" svg:viewBox="0 0 2251 711">
          <text:p/>
        </draw:connector>
        <draw:frame draw:style-name="gr2" draw:text-style-name="P5" xml:id="id40" draw:id="id40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2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2" draw:start-glue-point="3" draw:end-shape="id40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434cm" svg:x2="43.45cm" svg:y2="18.381cm" draw:start-shape="id43" draw:start-glue-point="3" draw:end-shape="id39" draw:end-glue-point="4" svg:d="M45750 17434c-1725 0-575 947-2300 947" svg:viewBox="0 0 2301 948">
          <text:p/>
        </draw:connector>
        <draw:frame draw:style-name="gr15" draw:text-style-name="P5" xml:id="id43" draw:id="id43" draw:layer="layout" svg:width="3.45cm" svg:height="1.156cm" svg:x="45.75cm" svg:y="16.856cm">
          <draw:text-box>
            <text:p text:style-name="P3"><text:span text:style-name="T4">dmstr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378cm" svg:x2="37cm" svg:y2="16.854cm" draw:start-shape="id44" draw:start-glue-point="3" draw:end-shape="id38" draw:end-glue-point="4" svg:d="M39200 16378c-1650 0-550 476-2200 476" svg:viewBox="0 0 2201 477">
          <text:p/>
        </draw:connector>
        <draw:frame draw:style-name="gr16" draw:text-style-name="P5" xml:id="id44" draw:id="id44" draw:layer="layout" svg:width="4.25cm" svg:height="1.156cm" svg:x="39.2cm" svg:y="15.8cm">
          <draw:text-box>
            <text:p text:style-name="P3"><text:span text:style-name="T4">istr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8.875cm" draw:start-shape="id45" draw:start-glue-point="3" draw:end-shape="id39" draw:end-glue-point="5" svg:d="M45750 19828c-1725 0-575-953-2300-953" svg:viewBox="0 0 2301 954">
          <text:p/>
        </draw:connector>
        <draw:frame draw:style-name="gr17" draw:text-style-name="P5" xml:id="id45" draw:id="id45" draw:layer="layout" svg:width="3.45cm" svg:height="1.444cm" svg:x="45.75cm" svg:y="19.106cm">
          <draw:text-box>
            <text:p text:style-name="P3"><text:span text:style-name="T4">smstr</text:span></text:p>
            <text:p text:style-name="P3"><text:span text:style-name="T12">&lt;cchStatic&gt;</text:span></text:p>
            <text:p text:style-name="P3"><text:span text:style-name="T3">Statically- or dynamically-allocated mutable string</text:span></text:p>
          </draw:text-box>
        </draw:frame>
        <draw:frame draw:style-name="gr14" draw:text-style-name="P5" xml:id="id42" draw:id="id42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3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6" draw:start-glue-point="3" draw:end-shape="id42" draw:end-glue-point="5" svg:d="M39200 13222c-1650 0-550-432-2200-432" svg:viewBox="0 0 2201 433">
          <text:p/>
        </draw:connector>
        <draw:frame draw:style-name="gr14" draw:text-style-name="P5" xml:id="id46" draw:id="id46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3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7" draw:start-glue-point="3" draw:end-shape="id46" draw:end-glue-point="4" svg:d="M45750 12028c-1725 0-575 885-2300 885" svg:viewBox="0 0 2301 886">
          <text:p/>
        </draw:connector>
        <draw:frame draw:style-name="gr15" draw:text-style-name="P5" xml:id="id47" draw:id="id47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2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8" draw:start-glue-point="3" draw:end-shape="id42" draw:end-glue-point="4" svg:d="M39200 10972c-1650 0-550 1314-2200 1314" svg:viewBox="0 0 2201 1315">
          <text:p/>
        </draw:connector>
        <draw:frame draw:style-name="gr18" draw:text-style-name="P5" xml:id="id48" draw:id="id48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2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9" draw:start-glue-point="3" draw:end-shape="id46" draw:end-glue-point="5" svg:d="M45750 14278c-1725 0-575-747-2300-747" svg:viewBox="0 0 2301 748">
          <text:p/>
        </draw:connector>
        <draw:frame draw:style-name="gr17" draw:text-style-name="P5" xml:id="id49" draw:id="id49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2">&lt;T, ciStatic&gt;</text:span></text:p>
            <text:p text:style-name="P3"><text:span text:style-name="T3">Statically- or dynamically-allocated mutable vector</text:span></text:p>
          </draw:text-box>
        </draw:frame>
        <draw:frame draw:style-name="gr11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4-09-20T12:23:27.633851322</dc:date>
    <dc:creator>Raffaello D. Di Napoli</dc:creator>
    <meta:editing-duration>P41DT14H10M41S</meta:editing-duration>
    <meta:editing-cycles>381</meta:editing-cycles>
    <meta:generator>LibreOffice/4.2.5.2$Linux_X86_64 LibreOffice_project/420m0$Build-2</meta:generator>
    <meta:document-statistic meta:object-count="113"/>
  </office:meta>
</office:document-meta>
</file>